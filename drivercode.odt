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linux/module.h&gt;</text:p>
      <text:p text:style-name="Standard">#include&lt;linux/fs.h&gt;</text:p>
      <text:p text:style-name="Standard">#include&lt;linux/cdev.h&gt;</text:p>
      <text:p text:style-name="Standard">#include&lt;linux/device.h&gt;</text:p>
      <text:p text:style-name="Standard">#include&lt;linux/uaccess.h&gt;</text:p>
      <text:p text:style-name="Standard"/>
      <text:p text:style-name="Standard">#define BUF_SIZE 100</text:p>
      <text:p text:style-name="Standard"/>
      <text:p text:style-name="Standard">static dev_t dev_num;</text:p>
      <text:p text:style-name="Standard">static struct cdev my_cdev;</text:p>
      <text:p text:style-name="Standard">static struct class *my_class;</text:p>
      <text:p text:style-name="Standard"/>
      <text:p text:style-name="Standard">static char kernel_buffer[BUF_SIZE]="Hello from kernel";</text:p>
      <text:p text:style-name="Standard"/>
      <text:p text:style-name="Standard">/*Open*/</text:p>
      <text:p text:style-name="Standard"/>
      <text:p text:style-name="Standard">static int my_open(struct inode *inode,struct file *file)</text:p>
      <text:p text:style-name="Standard">{</text:p>
      <text:p text:style-name="Standard"><text:s text:c="8"/>pr_info("embedded : Device opened\n");</text:p>
      <text:p text:style-name="Standard"><text:s text:c="8"/>return 0;</text:p>
      <text:p text:style-name="Standard">}</text:p>
      <text:p text:style-name="Standard"/>
      <text:p text:style-name="Standard">/*Close*/</text:p>
      <text:p text:style-name="Standard"/>
      <text:p text:style-name="Standard">static int my_release(struct inode *inode,struct file *file)</text:p>
      <text:p text:style-name="Standard">{</text:p>
      <text:p text:style-name="Standard"><text:s text:c="8"/>pr_info("Embedded : Device closed\n");</text:p>
      <text:p text:style-name="Standard"><text:s text:c="8"/>return 0;</text:p>
      <text:p text:style-name="Standard">}</text:p>
      <text:p text:style-name="Standard"/>
      <text:p text:style-name="Standard">/*Read*/</text:p>
      <text:p text:style-name="Standard"/>
      <text:p text:style-name="Standard">static ssize_t my_read(struct file *file,char __user *buf,size_t len,loff_t *off)</text:p>
      <text:p text:style-name="Standard">{</text:p>
      <text:p text:style-name="Standard"><text:s text:c="8"/>int bytes=strlen(kernel_buffer);</text:p>
      <text:p text:style-name="Standard"><text:s text:c="8"/>if(*off&gt;=bytes)</text:p>
      <text:p text:style-name="Standard"><text:s text:c="16"/>return 0;</text:p>
      <text:p text:style-name="Standard"><text:s text:c="8"/>if(copy_to_user(buf,kernel_buffer,bytes))</text:p>
      <text:p text:style-name="Standard"><text:s text:c="16"/>return -EFAULT;</text:p>
      <text:p text:style-name="Standard"><text:s text:c="8"/>*off +=bytes;</text:p>
      <text:p text:style-name="Standard"><text:s text:c="8"/>pr_info("Embedded : Read called \n");</text:p>
      <text:p text:style-name="Standard"><text:s text:c="8"/>return bytes;</text:p>
      <text:p text:style-name="Standard">}</text:p>
      <text:p text:style-name="Standard"/>
      <text:p text:style-name="Standard">/*Write*/</text:p>
      <text:p text:style-name="Standard"/>
      <text:p text:style-name="Standard">static ssize_t my_write(struct file *file,const char __user *buf,size_t len,loff_t *off)</text:p>
      <text:p text:style-name="Standard">{</text:p>
      <text:p text:style-name="Standard"><text:s text:c="8"/>if(len&gt;BUF_SIZE -1)</text:p>
      <text:p text:style-name="Standard"><text:s text:c="16"/>len=BUF_SIZE -1;</text:p>
      <text:p text:style-name="Standard"><text:s text:c="8"/>if(copy_from_user(kernel_buffer,buf,len))</text:p>
      <text:p text:style-name="Standard"><text:s text:c="16"/>return -EFAULT;</text:p>
      <text:p text:style-name="Standard"><text:soft-page-break/><text:s text:c="8"/>kernel_buffer[len]='\0';</text:p>
      <text:p text:style-name="Standard"><text:s text:c="8"/>pr_info("Embedded : Write called : %s\n",kernel_buffer);</text:p>
      <text:p text:style-name="Standard"><text:s text:c="8"/>return len;</text:p>
      <text:p text:style-name="Standard">}</text:p>
      <text:p text:style-name="Standard"/>
      <text:p text:style-name="Standard">/*File Operation*/</text:p>
      <text:p text:style-name="Standard"/>
      <text:p text:style-name="Standard">static struct file_operations fops={</text:p>
      <text:p text:style-name="Standard"><text:s text:c="8"/>.owner=THIS_MODULE,</text:p>
      <text:p text:style-name="Standard"><text:s text:c="8"/>.open=my_open,</text:p>
      <text:p text:style-name="Standard"><text:s text:c="8"/>.read=my_read,</text:p>
      <text:p text:style-name="Standard"><text:s text:c="8"/>.write=my_write,</text:p>
      <text:p text:style-name="Standard"><text:s text:c="8"/>.release=my_release</text:p>
      <text:p text:style-name="Standard">};</text:p>
      <text:p text:style-name="Standard"/>
      <text:p text:style-name="Standard">static int __init demo_init(void)</text:p>
      <text:p text:style-name="Standard">{</text:p>
      <text:p text:style-name="Standard"><text:s text:c="8"/>int ret;</text:p>
      <text:p text:style-name="Standard"><text:s text:c="8"/>ret=alloc_chrdev_region(&amp;dev_num,0,1,"embedded");</text:p>
      <text:p text:style-name="Standard"><text:s text:c="8"/>if(ret)</text:p>
      <text:p text:style-name="Standard"><text:s text:c="16"/>return ret;</text:p>
      <text:p text:style-name="Standard"><text:s text:c="8"/>cdev_init(&amp;my_cdev,&amp;fops);</text:p>
      <text:p text:style-name="Standard"><text:s text:c="8"/>ret=cdev_add(&amp;my_cdev,dev_num,1);</text:p>
      <text:p text:style-name="Standard"><text:s text:c="8"/>if(ret)</text:p>
      <text:p text:style-name="Standard"><text:s text:c="16"/>return ret;</text:p>
      <text:p text:style-name="Standard"/>
      <text:p text:style-name="Standard"><text:s text:c="8"/>/* class name*/</text:p>
      <text:p text:style-name="Standard"><text:s text:c="8"/>my_class=class_create(THIS_MODULE,"Sai");</text:p>
      <text:p text:style-name="Standard"/>
      <text:p text:style-name="Standard"><text:s text:c="8"/>/*Device Name*/</text:p>
      <text:p text:style-name="Standard"><text:s text:c="8"/>device_create(my_class,NULL,dev_num,NULL,"embedded");</text:p>
      <text:p text:style-name="Standard"><text:s text:c="8"/>pr_info("Driver Loaded\n");</text:p>
      <text:p text:style-name="Standard"><text:s text:c="8"/>pr_info("Major=%d Minor=%d\n",MAJOR(dev_num),MINOR(dev_num));</text:p>
      <text:p text:style-name="Standard"/>
      <text:p text:style-name="Standard"><text:s text:c="8"/>return 0;</text:p>
      <text:p text:style-name="Standard">}</text:p>
      <text:p text:style-name="Standard"/>
      <text:p text:style-name="Standard">static void __exit demo_exit(void)</text:p>
      <text:p text:style-name="Standard">{</text:p>
      <text:p text:style-name="Standard"><text:s text:c="8"/>device_destroy(my_class,dev_num);</text:p>
      <text:p text:style-name="Standard"><text:s text:c="8"/>class_destroy(my_class);</text:p>
      <text:p text:style-name="Standard"/>
      <text:p text:style-name="Standard"><text:s text:c="8"/>cdev_del(&amp;my_cdev);</text:p>
      <text:p text:style-name="Standard"><text:s text:c="8"/>unregister_chrdev_region(dev_num,1);</text:p>
      <text:p text:style-name="Standard"><text:s text:c="8"/>pr_info("Driver unloaded\n");</text:p>
      <text:p text:style-name="Standard"/>
      <text:p text:style-name="Standard">}</text:p>
      <text:p text:style-name="Standard"/>
      <text:p text:style-name="Standard">module_init(demo_init);</text:p>
      <text:p text:style-name="Standard">module_exit(demo_exit);</text:p>
      <text:p text:style-name="Standard"/>
      <text:p text:style-name="Standard">MODULE_LICENSE("GPL");</text:p>
      <text:p text:style-name="Standard"><text:soft-page-break/>MODULE_AUTHOR("RAbindra");</text:p>
      <text:p text:style-name="Standard">MODULE_DESCRIPTION("Simple character Driver demo"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include&lt;stdio.h&gt;</text:p>
      <text:p text:style-name="Standard">#include&lt;fcntl.h&gt;</text:p>
      <text:p text:style-name="Standard">#include&lt;unistd.h&gt;</text:p>
      <text:p text:style-name="Standard">#include&lt;string.h&gt;</text:p>
      <text:p text:style-name="Standard"/>
      <text:p text:style-name="Standard">int main()</text:p>
      <text:p text:style-name="Standard">{</text:p>
      <text:p text:style-name="Standard"><text:s text:c="8"/>int fd;</text:p>
      <text:p text:style-name="Standard"><text:s text:c="8"/>char buffer[100]={0};</text:p>
      <text:p text:style-name="Standard"><text:s text:c="8"/>fd=open("/dev/embedded",O_RDWR);</text:p>
      <text:p text:style-name="Standard"><text:s text:c="8"/>if(fd&lt;0)</text:p>
      <text:p text:style-name="Standard"><text:s text:c="8"/>{</text:p>
      <text:p text:style-name="Standard"><text:s text:c="16"/>perror("open");</text:p>
      <text:p text:style-name="Standard"><text:s text:c="16"/>return -1;</text:p>
      <text:p text:style-name="Standard"><text:s text:c="8"/>}</text:p>
      <text:p text:style-name="Standard"><text:s text:c="8"/>printf("Device opened successfully\n");</text:p>
      <text:p text:style-name="Standard"><text:s text:c="8"/>write(fd,"Hello Rabi Driver",strlen("Hello Rabi Driver"));</text:p>
      <text:p text:style-name="Standard"><text:s text:c="8"/>lseek(fd,0,SEEK_SET);</text:p>
      <text:p text:style-name="Standard"><text:s text:c="8"/>read(fd,buffer,sizeof(buffer));</text:p>
      <text:p text:style-name="Standard"><text:s text:c="8"/>printf("Data read from driver : %s\n",buffer);</text:p>
      <text:p text:style-name="Standard"><text:s text:c="8"/>close(fd);</text:p>
      <text:p text:style-name="Standard"><text:s text:c="8"/>return 0;</text:p>
      <text:p text:style-name="Standard">}</text:p>
      <text:p text:style-name="Standard"/>
      <text:p text:style-name="Standard">~ <text:s text:c="609"/></text:p>
      <text:p text:style-name="Standard">~ <text:s text:c="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6-25T17:13:10.714359821</meta:creation-date>
    <dc:date>2026-06-25T17:14:05.147211841</dc:date>
    <meta:editing-duration>PT55S</meta:editing-duration>
    <meta:editing-cycles>1</meta:editing-cycles>
    <meta:document-statistic meta:table-count="0" meta:image-count="0" meta:object-count="0" meta:page-count="3" meta:paragraph-count="108" meta:word-count="216" meta:character-count="3477" meta:non-whitespace-character-count="2201"/>
    <meta:generator>LibreOffice/6.4.7.2$Linux_X86_64 LibreOffice_project/40$Build-2</meta:generator>
  </office:meta>
</office:document-meta>
</file>